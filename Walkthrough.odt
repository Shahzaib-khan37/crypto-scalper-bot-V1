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Heading">
      <style:paragraph-properties fo:text-align="lef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ext_20_body">
      <style:text-properties style:font-name="Calibri" fo:font-weight="bold" officeooo:rsid="001013af" style:font-weight-asian="bold" style:font-weight-complex="bold"/>
    </style:style>
    <style:style style:name="P6" style:family="paragraph" style:parent-style-name="Standard">
      <style:text-properties style:font-name="Calibri" fo:font-weight="bold" officeooo:rsid="001013af" officeooo:paragraph-rsid="001013af" style:font-weight-asian="bold" style:font-weight-complex="bold"/>
    </style:style>
    <style:style style:name="P7" style:family="paragraph" style:parent-style-name="Standard">
      <style:text-properties style:font-name="Calibri" fo:font-weight="normal" officeooo:rsid="001013af" officeooo:paragraph-rsid="001013af" style:font-weight-asian="normal" style:font-weight-complex="normal"/>
    </style:style>
    <style:style style:name="P8" style:family="paragraph" style:parent-style-name="Standard">
      <style:text-properties style:font-name="Calibri" fo:font-size="14pt" fo:font-weight="bold" officeooo:rsid="00104990" officeooo:paragraph-rsid="0010499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ibri" fo:font-weight="normal" officeooo:rsid="00104990" officeooo:paragraph-rsid="00104990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10ffac" officeooo:paragraph-rsid="0010ffac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118a9a" officeooo:paragraph-rsid="00118a9a" style:font-weight-asian="normal" style:font-weight-complex="normal"/>
    </style:style>
    <style:style style:name="P12" style:family="paragraph" style:parent-style-name="Standard">
      <style:text-properties style:font-name="Calibri" fo:font-weight="normal" officeooo:rsid="0012979b" officeooo:paragraph-rsid="0012979b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📋 Is Bot Mein Jo Kuch Kaam Kar Raha Hai (Complete List)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Feature</text:p>
            </table:table-cell>
            <table:table-cell table:style-name="Table1.B1" office:value-type="string">
              <text:p text:style-name="P2">Status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T1">EMA_MACD_Crossover</text:span> strategy (15m candlesticks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Option 1</text:span> Risk: Fixed 1% SL / 2% TP (1:2 RR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Real-time Risk Monitor</text:span> (SL/TP check har 2 second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Dynamic Capital Division</text:span> (<text:span text:style-name="T2">free_capital / slots_left</text:span>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Binance Live Balance Sync</text:span> (Total NAV + Free USDT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External Sell Detection</text:span> (manual sells auto-close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Portfolio Holdings</text:span> + Manual Sell (% or $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Time Stop</text:span> (12 hours max per trade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Notional Dust Protection</text:span> ($5 minimum, Binance rule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Table_20_Contents"><text:span text:style-name="T1">Exchange Status Monitor</text:span> (30-sec background ping)</text:p>
          </table:table-cell>
          <table:table-cell table:style-name="Table1.B2" office:value-type="string">
            <text:p text:style-name="P3">✅</text:p>
          </table:table-cell>
        </table:table-row>
        <table:table-row>
          <table:table-cell table:style-name="Table1.A2" office:value-type="string">
            <text:p text:style-name="P4">watchlist NameError bug</text:p>
          </table:table-cell>
          <table:table-cell table:style-name="Table1.B2" office:value-type="string">
            <text:p text:style-name="P3">✅ Fixed</text:p>
          </table:table-cell>
        </table:table-row>
      </table:table>
      <text:p text:style-name="P5"/>
      <text:p text:style-name="P6">Watch lists Update</text:p>
      <text:p text:style-name="P7">watch lists section upgraded, available globally har account , save,rename and more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Status</text:p>
      <text:p text:style-name="P9">Now Running Live Trading Test with Real Binance Sub Account <text:s text:c="2"/>4/6/26</text:p>
      <text:p text:style-name="P10">Starting Balance: 131.71 Dollars</text:p>
      <text:p text:style-name="P11">Server Local</text:p>
      <text:p text:style-name="P11">Port 5000</text:p>
      <text:p text:style-name="P12">GitHub <text:s/>N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2:55:08.919472100</meta:creation-date>
    <dc:date>2026-06-04T14:19:42.880801900</dc:date>
    <meta:editing-duration>PT1H10M15S</meta:editing-duration>
    <meta:editing-cycles>4</meta:editing-cycles>
    <meta:generator>LibreOffice/26.2.3.2$Windows_X86_64 LibreOffice_project/70e089b17412e4cb7773e41413306b17a2328c34</meta:generator>
    <meta:document-statistic meta:table-count="1" meta:image-count="0" meta:object-count="0" meta:page-count="1" meta:paragraph-count="33" meta:word-count="138" meta:character-count="809" meta:non-whitespace-character-count="701"/>
  </office:meta>
</office:document-meta>
</file>